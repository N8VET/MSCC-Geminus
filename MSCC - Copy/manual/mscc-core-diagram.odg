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6%" draw:textarea-horizontal-align="justify" draw:textarea-vertical-align="middle" draw:auto-grow-height="false" fo:min-height="3.179cm" fo:min-width="4.199cm"/>
    </style:style>
    <style:style style:name="gr2" style:family="graphic" style:parent-style-name="standard">
      <style:graphic-properties draw:opacity="13%" draw:textarea-horizontal-align="justify" draw:textarea-vertical-align="middle" draw:auto-grow-height="false" fo:min-height="17.149cm" fo:min-width="17.788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opacity="16%" draw:textarea-horizontal-align="justify" draw:textarea-vertical-align="middle" draw:auto-grow-height="false" fo:min-height="3.522cm" fo:min-width="5.159cm"/>
    </style:style>
    <style:style style:name="gr6" style:family="graphic" style:parent-style-name="standard">
      <style:graphic-properties draw:fill-color="#66ff00" draw:textarea-horizontal-align="justify" draw:textarea-vertical-align="middle" draw:auto-grow-height="false" fo:min-height="1.546cm" fo:min-width="3.003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2.266cm" fo:min-width="3.632cm"/>
    </style:style>
    <style:style style:name="gr8" style:family="graphic" style:parent-style-name="standard">
      <style:graphic-properties draw:fill-color="#ff66ff" draw:textarea-horizontal-align="justify" draw:textarea-vertical-align="middle" draw:auto-grow-height="false" fo:min-height="2.266cm" fo:min-width="3.63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66ff" draw:textarea-horizontal-align="justify" draw:textarea-vertical-align="middle" draw:auto-grow-height="false" fo:min-height="0.575cm" fo:min-width="1.735cm" fo:wrap-option="no-wrap"/>
    </style:style>
    <style:style style:name="gr11" style:family="graphic" style:parent-style-name="standard">
      <style:graphic-properties draw:fill-color="#ff66ff" draw:textarea-horizontal-align="justify" draw:textarea-vertical-align="middle" draw:auto-grow-height="false" fo:min-height="3.855cm" fo:min-width="0.303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2.204cm" fo:min-width="0.303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575cm" fo:min-width="1.754cm" fo:wrap-option="no-wrap"/>
    </style:style>
    <style:style style:name="gr14" style:family="graphic" style:parent-style-name="standard">
      <style:graphic-properties draw:fill-color="#66ff00" draw:textarea-horizontal-align="justify" draw:textarea-vertical-align="middle" draw:auto-grow-height="false" fo:min-height="0.575cm" fo:min-width="2.324cm" fo:wrap-option="no-wrap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75cm" fo:min-width="1.73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1.442cm" fo:min-width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1.398cm" fo:min-width="1.735cm" fo:wrap-option="no-wrap"/>
    </style:style>
    <style:style style:name="gr18" style:family="graphic" style:parent-style-name="standard">
      <style:graphic-properties draw:fill-color="#ff66ff" draw:textarea-horizontal-align="justify" draw:textarea-vertical-align="middle" draw:auto-grow-height="false" fo:min-height="0.575cm" fo:min-width="2.205cm" fo:wrap-option="no-wrap"/>
    </style:style>
    <style:style style:name="gr19" style:family="graphic" style:parent-style-name="standard">
      <style:graphic-properties draw:fill-color="#ff66ff" draw:textarea-horizontal-align="justify" draw:textarea-vertical-align="middle" draw:auto-grow-height="false" fo:min-height="0.575cm" fo:min-width="1.852cm" fo:wrap-option="no-wrap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575cm" fo:min-width="2.205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0.575cm" fo:min-width="1.61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opacity="16%"/>
      <style:paragraph-properties fo:text-align="center"/>
    </style:style>
    <style:style style:name="P3" style:family="paragraph">
      <loext:graphic-properties draw:opacity="13%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66ff"/>
      <style:paragraph-properties fo:text-align="center"/>
    </style:style>
    <style:style style:name="P9" style:family="paragraph">
      <loext:graphic-properties draw:fill-color="#ff66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66ff00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3.429cm" svg:x="1.381cm" svg:y="7.604cm">
          <text:p text:style-name="P1">Proficio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8.288cm" svg:height="17.399cm" svg:x="8.42cm" svg:y="2.537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08cm" svg:y1="9.318cm" svg:x2="8.42cm" svg:y2="11.236cm" draw:start-shape="id1" draw:start-glue-point="1" draw:end-shape="id2" svg:d="M6080 9318l2340 1918" svg:viewBox="0 0 2341 1919">
          <text:p/>
        </draw:connector>
        <draw:frame draw:style-name="gr4" draw:text-style-name="P5" draw:layer="layout" svg:width="2.413cm" svg:height="1.016cm" svg:x="16.24cm" svg:y="1.635cm">
          <draw:text-box>
            <text:p>HOST</text:p>
          </draw:text-box>
        </draw:frame>
        <draw:custom-shape draw:style-name="gr5" draw:text-style-name="P2" xml:id="id6" draw:id="id6" draw:layer="layout" svg:width="8.001cm" svg:height="5.332cm" svg:x="13.7cm" svg:y="8.747cm">
          <text:p text:style-name="P1">MS-SD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4.953cm" svg:height="2.54cm" svg:x="9.382cm" svg:y="3.159cm">
          <text:p text:style-name="P1">MS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9" draw:id="id9" draw:layer="layout" svg:width="5.842cm" svg:height="3.556cm" svg:x="14.652cm" svg:y="15.858cm">
          <text:p text:style-name="P1">SDRcore</text:p>
          <text:p text:style-name="P1">(Transmit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5.842cm" svg:height="3.556cm" svg:x="17.51cm" svg:y="2.651cm">
          <text:p text:style-name="P1">SDRcore</text:p>
          <text:p text:style-name="P1">(Receive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8.857cm" svg:y1="10.653cm" svg:x2="18.365cm" svg:y2="5.687cm" draw:start-shape="id3" draw:end-shape="id4" draw:end-glue-point="7" svg:d="M8857 10653l9508-4966" svg:viewBox="0 0 9509 4967">
          <text:p/>
        </draw:connector>
        <draw:connector draw:style-name="gr9" draw:text-style-name="P4" draw:layer="layout" draw:type="line" svg:x1="22.497cm" svg:y1="5.687cm" svg:x2="26.209cm" svg:y2="9.001cm" draw:start-shape="id4" draw:start-glue-point="9" draw:end-shape="id5" svg:d="M22497 5687l3712 3314" svg:viewBox="0 0 3713 3315">
          <text:p/>
        </draw:connector>
        <draw:connector draw:style-name="gr3" draw:text-style-name="P4" draw:layer="layout" draw:type="line" svg:x1="14.871cm" svg:y1="9.527cm" svg:x2="11.859cm" svg:y2="5.699cm" draw:start-shape="id6" draw:start-glue-point="5" draw:end-shape="id7" draw:end-glue-point="8" svg:d="M14871 9527l-3012-3828" svg:viewBox="0 0 3013 3829">
          <text:p/>
        </draw:connector>
        <draw:custom-shape draw:style-name="gr10" draw:text-style-name="P9" draw:layer="layout" svg:width="2.413cm" svg:height="0.889cm" svg:x="14.716cm" svg:y="3.54cm">
          <text:p text:style-name="P1"><text:span text:style-name="T1">I/Q</text:span></text:p>
          <draw:enhanced-geometry svg:viewBox="0 0 21600 21600" draw:text-areas="800 800 20800 20800" draw:type="round-rectangular-callout" draw:modifiers="14915.990057995 78852.1348314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xml:id="id5" draw:id="id5" draw:layer="layout" svg:width="0.889cm" svg:height="4.191cm" svg:x="25.765cm" svg:y="9.001cm">
          <text:p text:style-name="P1"><text:span text:style-name="T1">S</text:span></text:p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K</text:span></text:p>
          <text:p text:style-name="P1"><text:span text:style-name="T1">E</text:span></text:p>
          <text:p text:style-name="P1"><text:span text:style-name="T1">R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8" draw:id="id8" draw:layer="layout" svg:width="0.889cm" svg:height="2.54cm" svg:x="25.765cm" svg:y="13.954cm">
          <text:p text:style-name="P1"><text:span text:style-name="T1">M</text:span></text:p>
          <text:p text:style-name="P1"><text:span text:style-name="T1">I</text:span></text:p>
          <text:p text:style-name="P1"><text:span text:style-name="T1">C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25.765cm" svg:y1="15.224cm" svg:x2="20.494cm" svg:y2="17.636cm" draw:start-shape="id8" draw:start-glue-point="3" draw:end-shape="id9" svg:d="M25765 15224l-5271 2412" svg:viewBox="0 0 5272 2413">
          <text:p/>
        </draw:connector>
        <draw:connector draw:style-name="gr9" draw:text-style-name="P4" draw:layer="layout" draw:type="line" svg:x1="14.652cm" svg:y1="17.636cm" svg:x2="8.857cm" svg:y2="12.431cm" draw:start-shape="id9" draw:start-glue-point="6" draw:end-shape="id3" svg:d="M14652 17636l-5795-5205" svg:viewBox="0 0 5796 5206">
          <text:p/>
        </draw:connector>
        <draw:custom-shape draw:style-name="gr13" draw:text-style-name="P10" draw:layer="layout" svg:width="2.434cm" svg:height="0.889cm" svg:x="22.696cm" svg:y="18.513cm">
          <text:p text:style-name="P1"><text:span text:style-name="T1">Op Audio</text:span></text:p>
          <draw:enhanced-geometry svg:viewBox="0 0 21600 21600" draw:text-areas="800 800 20800 20800" draw:type="round-rectangular-callout" draw:modifiers="5872.3613963039 -53635.9550561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3.048cm" svg:height="0.889cm" svg:x="9.075cm" svg:y="7.284cm">
          <text:p text:style-name="P1"><text:span text:style-name="T1">Control (UDP)</text:span></text:p>
          <draw:enhanced-geometry svg:viewBox="0 0 21600 21600" draw:text-areas="800 800 20800 20800" draw:type="round-rectangular-callout" draw:modifiers="23371.0724827812 -12668.7640449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2.413cm" svg:height="0.889cm" svg:x="10.398cm" svg:y="18.272cm">
          <text:p text:style-name="P1"><text:span text:style-name="T1">I/Q </text:span></text:p>
          <draw:enhanced-geometry svg:viewBox="0 0 21600 21600" draw:text-areas="800 800 20800 20800" draw:type="round-rectangular-callout" draw:modifiers="21993.7033968517 -54097.0786516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0.889cm" svg:height="1.778cm" svg:x="5.191cm" svg:y="8.747cm">
          <text:p text:style-name="P1"><text:span text:style-name="T1">U</text:span></text:p>
          <text:p text:style-name="P1"><text:span text:style-name="T1">S</text:span></text:p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2.413cm" svg:height="1.778cm" svg:x="2.016cm" svg:y="12.684cm">
          <text:p text:style-name="P1"><text:span text:style-name="T1">I/Q and</text:span></text:p>
          <text:p text:style-name="P1"><text:span text:style-name="T1">Control</text:span></text:p>
          <draw:enhanced-geometry svg:viewBox="0 0 21600 21600" draw:text-areas="800 800 20800 20800" draw:type="round-rectangular-callout" draw:modifiers="48452.3612261806 -27136.59359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xml:id="id3" draw:id="id3" draw:layer="layout" svg:width="0.889cm" svg:height="1.778cm" svg:x="8.413cm" svg:y="10.653cm">
          <text:p text:style-name="P1"><text:span text:style-name="T1">U</text:span></text:p>
          <text:p text:style-name="P1"><text:span text:style-name="T1">S</text:span></text:p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.921cm" svg:height="0.889cm" svg:x="20.812cm" svg:y="7.858cm">
          <text:p text:style-name="P1"><text:span text:style-name="T1">Control (UDP)</text:span></text:p>
          <draw:enhanced-geometry svg:viewBox="0 0 21600 21600" draw:text-areas="800 800 20800 20800" draw:type="round-rectangular-callout" draw:modifiers="-12980.6981519507 -2596.85393258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4" draw:layer="layout" draw:type="line" svg:x1="20.431cm" svg:y1="6.207cm" svg:x2="17.701cm" svg:y2="8.747cm" draw:start-shape="id4" draw:start-glue-point="8" svg:d="M20431 6207l-2730 2540" svg:viewBox="0 0 2731 2541">
          <text:p/>
        </draw:connector>
        <draw:custom-shape draw:style-name="gr19" draw:text-style-name="P9" draw:layer="layout" svg:width="2.54cm" svg:height="0.889cm" svg:x="23.352cm" svg:y="5.191cm">
          <text:p text:style-name="P1"><text:span text:style-name="T1">Op Audio</text:span></text:p>
          <draw:enhanced-geometry svg:viewBox="0 0 21600 21600" draw:text-areas="800 800 20800 20800" draw:type="round-rectangular-callout" draw:modifiers="9308.14639905549 52883.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4" draw:layer="layout" draw:type="line" svg:x1="17.701cm" svg:y1="14.081cm" svg:x2="17.538cm" svg:y2="15.859cm" svg:d="M17701 14081l-163 1778" svg:viewBox="0 0 164 1779">
          <text:p/>
        </draw:connector>
        <draw:custom-shape draw:style-name="gr20" draw:text-style-name="P10" draw:layer="layout" svg:width="2.921cm" svg:height="0.889cm" svg:x="19.415cm" svg:y="15.224cm">
          <text:p text:style-name="P1"><text:span text:style-name="T1">Control (UDP)</text:span></text:p>
          <draw:enhanced-geometry svg:viewBox="0 0 21600 21600" draw:text-areas="800 800 20800 20800" draw:type="round-rectangular-callout" draw:modifiers="-12980.6981519507 -2596.85393258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4" draw:layer="layout" draw:type="line" svg:x1="13.7cm" svg:y1="11.413cm" svg:x2="9.302cm" svg:y2="11.542cm" draw:start-shape="id6" draw:start-glue-point="6" draw:end-shape="id3" draw:end-glue-point="1" svg:d="M13700 11413l-4398 129" svg:viewBox="0 0 4399 130">
          <text:p/>
        </draw:connector>
        <draw:custom-shape draw:style-name="gr21" draw:text-style-name="P12" draw:layer="layout" svg:width="2.286cm" svg:height="0.889cm" svg:x="11.287cm" svg:y="12.811cm">
          <text:p text:style-name="P1"><text:span text:style-name="T1">Control </text:span></text:p>
          <text:p text:style-name="P1"><text:span text:style-name="T1">(libusb)</text:span></text:p>
          <draw:enhanced-geometry svg:viewBox="0 0 21600 21600" draw:text-areas="800 800 20800 20800" draw:type="round-rectangular-callout" draw:modifiers="10011.3686051596 -29390.5617977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2.1$Windows_X86_64 LibreOffice_project/f7f06a8f319e4b62f9bc5095aa112a65d2f3ac89</meta:generator>
    <dc:date>2018-09-30T10:08:14.171000000</dc:date>
    <meta:editing-duration>PT9H53M22S</meta:editing-duration>
    <meta:editing-cycles>14</meta:editing-cycles>
    <meta:document-statistic meta:object-count="29"/>
  </office:meta>
</office:document-meta>
</file>