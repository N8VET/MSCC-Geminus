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ize="14pt" style:font-size-asian="14pt" style:font-size-complex="14pt"/>
    </style:style>
    <style:style style:name="P2" style:family="paragraph" style:parent-style-name="Heading_20_4">
      <style:text-properties fo:font-size="14pt" style:font-size-asian="14pt" style:font-size-complex="14pt"/>
    </style:style>
    <style:style style:name="P3" style:family="paragraph" style:parent-style-name="Text_20_body">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ttings</text:h>
      <text:h text:style-name="P2" text:outline-level="4"><text:bookmark text:name="user-content-mode"/>MODE</text:h>
      <text:p text:style-name="P3">Choose from Iambic, Ultimatic, Bug, or Straight keying. Note that you can not program messages in straight key mode. The bug mode is useful for tuning your antenna when you need to transmit a long tone.</text:p>
      <text:h text:style-name="P2" text:outline-level="4"><text:bookmark text:name="user-content-memory"/>MEMORY</text:h>
      <text:p text:style-name="P3">Memory type determines if new dots and dashes are looked at before the current element finishes sending. With Type B you send the letter N by pressing dash then dot as fast as you want. With Type A (no memory) you send an N by pressing dash then holding dot until it begins sending. You may also choose to only have memory on either dots or dashes.</text:p>
      <text:h text:style-name="P2" text:outline-level="4"><text:bookmark text:name="user-content-spacing"/>SPACING</text:h>
      <text:p text:style-name="P3">Spacing defines how the keyer will enforce the off time between elements, characters, and words. The character and word settings are useful tools to help you learn better spacing.</text:p>
      <text:h text:style-name="P2" text:outline-level="4"><text:bookmark text:name="user-content-weighting"/>WEIGHTING</text:h>
      <text:p text:style-name="P3">Weighting refers to the balance between the on and off time of a dot. Normally, a series of dots is exactly balanced 50% on and 50% off. If you want a heavier or lighter sound, adjust this to your preference.</text:p>
      <text:h text:style-name="P2" text:outline-level="4"><text:bookmark text:name="user-content-paddle"/>PADDLE</text:h>
      <text:p text:style-name="P3">Normally, a key is wired with the dots(left) on the tip of the plug and dashes(right) on the ring. You can reverse this in software so you don't have to rewire your key or want to share with someone who sends the other direction.</text:p>
      <text:h text:style-name="P2" text:outline-level="4"><text:bookmark text:name="user-content-tx-lag"/>TX LAG</text:h>
      <text:p text:style-name="P3">Some transmitters have a small delay between the time they are activated and when the transmission actually begins. Use this setting to lengthen the time the transmitter is activated for elements. This is a constant time added to every element unlike weighting which will adapt based on the sending spe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8T11:20:58.697000000</dc:date>
    <meta:editing-duration>PT3M37S</meta:editing-duration>
    <meta:editing-cycles>3</meta:editing-cycles>
    <meta:generator>LibreOffice/7.1.2.2$Windows_X86_64 LibreOffice_project/8a45595d069ef5570103caea1b71cc9d82b2aae4</meta:generator>
    <meta:document-statistic meta:table-count="0" meta:image-count="0" meta:object-count="0" meta:page-count="1" meta:paragraph-count="13" meta:word-count="274" meta:character-count="1517" meta:non-whitespace-character-count="1256"/>
  </office:meta>
</office:document-meta>
</file>