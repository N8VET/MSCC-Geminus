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82200000258B6935E8FAF8BBBCF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officeooo:rsid="000f1a2d" officeooo:paragraph-rsid="000f1a2d" style:font-size-asian="10.5pt" style:font-size-complex="12pt"/>
    </style:style>
    <style:style style:name="P2" style:family="paragraph" style:parent-style-name="Header">
      <style:paragraph-properties fo:text-align="center" style:justify-single-word="false"/>
      <style:text-properties fo:font-size="18pt" officeooo:rsid="000f1a2d" officeooo:paragraph-rsid="000f1a2d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officeooo:rsid="0000c682" officeooo:paragraph-rsid="0000c682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rsid="0000c682" officeooo:paragraph-rsid="0008b44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00c682" officeooo:paragraph-rsid="00165276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rsid="0000c682" officeooo:paragraph-rsid="0020bece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rsid="0000c682" officeooo:paragraph-rsid="00276546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4b39a" officeooo:paragraph-rsid="0024b39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8pt" officeooo:paragraph-rsid="00165276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officeooo:paragraph-rsid="0010bf02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4b39a" officeooo:paragraph-rsid="0024b39a" style:font-weight-asian="normal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Times New Roman" fo:font-size="14pt" officeooo:rsid="0000c682" officeooo:paragraph-rsid="0000c682" style:font-size-asian="14pt" style:font-size-complex="14pt"/>
    </style:style>
    <style:style style:name="P13" style:family="paragraph" style:parent-style-name="Standard">
      <style:paragraph-properties fo:text-align="start" style:justify-single-word="false" fo:break-before="page"/>
      <style:text-properties style:font-name="Times New Roman" fo:font-size="14pt" officeooo:rsid="0000c682" officeooo:paragraph-rsid="0008b44e" style:font-size-asian="14pt" style:font-size-complex="14pt"/>
    </style:style>
    <style:style style:name="P14" style:family="paragraph" style:parent-style-name="Standard">
      <style:paragraph-properties fo:text-align="start" style:justify-single-word="false" fo:break-before="page"/>
      <style:text-properties style:font-name="Times New Roman" fo:font-size="14pt" officeooo:rsid="0000c682" officeooo:paragraph-rsid="00165276" style:font-size-asian="14pt" style:font-size-complex="14pt"/>
    </style:style>
    <style:style style:name="P15" style:family="paragraph" style:parent-style-name="Standard">
      <style:paragraph-properties fo:text-align="start" style:justify-single-word="false" fo:break-before="page"/>
      <style:text-properties style:font-name="Times New Roman" fo:font-size="14pt" officeooo:rsid="0000c682" officeooo:paragraph-rsid="00276546" style:font-size-asian="14pt" style:font-size-complex="14pt"/>
    </style:style>
    <style:style style:name="P16" style:family="paragraph" style:parent-style-name="Standard">
      <style:paragraph-properties fo:text-align="start" style:justify-single-word="false" fo:break-before="page"/>
      <style:text-properties style:font-name="Times New Roman" fo:font-size="18pt" officeooo:paragraph-rsid="0008b44e" style:font-size-asian="18pt" style:font-size-complex="18pt"/>
    </style:style>
    <style:style style:name="P17" style:family="paragraph" style:parent-style-name="Standard">
      <style:paragraph-properties fo:text-align="start" style:justify-single-word="false" fo:break-before="page"/>
      <style:text-properties style:font-name="Times New Roman" fo:font-size="18pt" officeooo:paragraph-rsid="0020bece" style:font-size-asian="18pt" style:font-size-complex="18pt"/>
    </style:style>
    <style:style style:name="P18" style:family="paragraph" style:parent-style-name="Standard">
      <style:paragraph-properties fo:text-align="start" style:justify-single-word="false" fo:break-before="page"/>
      <style:text-properties officeooo:paragraph-rsid="0010bf02"/>
    </style:style>
    <style:style style:name="P19" style:family="paragraph" style:parent-style-name="Standard">
      <style:paragraph-properties fo:text-align="start" style:justify-single-word="false"/>
      <style:text-properties officeooo:paragraph-rsid="002c6472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Times New Roman" fo:font-size="14pt" fo:font-weight="normal" officeooo:rsid="0024b39a" officeooo:paragraph-rsid="0024b39a" style:font-size-asian="14pt" style:font-weight-asian="normal" style:font-size-complex="14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Times New Roman" fo:font-size="14pt" fo:font-weight="normal" officeooo:rsid="0027e327" officeooo:paragraph-rsid="0027e327" style:font-size-asian="14pt" style:font-weight-asian="normal" style:font-size-complex="14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Times New Roman" fo:font-size="14pt" fo:font-weight="normal" officeooo:rsid="002895d8" officeooo:paragraph-rsid="002895d8" style:font-size-asian="14pt" style:font-weight-asian="normal" style:font-size-complex="14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Times New Roman" fo:font-size="14pt" fo:font-weight="normal" officeooo:rsid="000c7d8c" officeooo:paragraph-rsid="00276546" style:font-size-asian="14pt" style:font-weight-asian="normal" style:font-size-complex="14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Times New Roman" fo:font-size="14pt" fo:font-weight="normal" officeooo:rsid="000205d1" officeooo:paragraph-rsid="0020bece" style:font-size-asian="14pt" style:font-weight-asian="normal" style:font-size-complex="14pt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style:font-name="Times New Roman" fo:font-size="14pt" fo:font-weight="normal" officeooo:rsid="000205d1" officeooo:paragraph-rsid="00165276" style:font-size-asian="14pt" style:font-weight-asian="normal" style:font-size-complex="14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Times New Roman" fo:font-size="14pt" officeooo:rsid="00281abb" officeooo:paragraph-rsid="00281abb" style:font-size-asian="14pt" style:font-size-complex="14pt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Times New Roman" fo:font-size="14pt" officeooo:rsid="00281abb" officeooo:paragraph-rsid="00281abb" style:font-size-asian="14pt" style:font-size-complex="14pt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Times New Roman" fo:font-size="14pt" officeooo:rsid="00299342" officeooo:paragraph-rsid="00299342" style:font-size-asian="14pt" style:font-size-complex="14pt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Times New Roman" fo:font-size="14pt" officeooo:rsid="0014d2e6" officeooo:paragraph-rsid="00276546" style:font-size-asian="14pt" style:font-size-complex="14pt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Times New Roman" fo:font-size="14pt" officeooo:rsid="0014d2e6" officeooo:paragraph-rsid="0020bece" style:font-size-asian="14pt" style:font-size-complex="14pt"/>
    </style:style>
    <style:style style:name="P31" style:family="paragraph" style:parent-style-name="Standard" style:list-style-name="L7">
      <style:paragraph-properties fo:text-align="start" style:justify-single-word="false"/>
      <style:text-properties style:font-name="Times New Roman" fo:font-size="14pt" officeooo:rsid="0014d2e6" officeooo:paragraph-rsid="00165276" style:font-size-asian="14pt" style:font-size-complex="14pt"/>
    </style:style>
    <style:style style:name="P32" style:family="paragraph" style:parent-style-name="Standard" style:list-style-name="L8">
      <style:paragraph-properties fo:text-align="start" style:justify-single-word="false"/>
      <style:text-properties style:font-name="Times New Roman" fo:font-size="14pt" officeooo:rsid="0014d2e6" officeooo:paragraph-rsid="0014d2e6" style:font-size-asian="14pt" style:font-size-complex="14pt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Times New Roman" fo:font-size="14pt" officeooo:rsid="0000c682" officeooo:paragraph-rsid="00276546" style:font-size-asian="14pt" style:font-size-complex="14pt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Times New Roman" fo:font-size="14pt" officeooo:rsid="0000c682" officeooo:paragraph-rsid="0020bece" style:font-size-asian="14pt" style:font-size-complex="14pt"/>
    </style:style>
    <style:style style:name="P35" style:family="paragraph" style:parent-style-name="Standard" style:list-style-name="L6">
      <style:paragraph-properties fo:text-align="start" style:justify-single-word="false"/>
      <style:text-properties style:font-name="Times New Roman" fo:font-size="14pt" officeooo:rsid="0000c682" officeooo:paragraph-rsid="0020f59d" style:font-size-asian="14pt" style:font-size-complex="14pt"/>
    </style:style>
    <style:style style:name="P36" style:family="paragraph" style:parent-style-name="Standard" style:list-style-name="L7">
      <style:paragraph-properties fo:text-align="start" style:justify-single-word="false"/>
      <style:text-properties style:font-name="Times New Roman" fo:font-size="14pt" officeooo:rsid="0000c682" officeooo:paragraph-rsid="00165276" style:font-size-asian="14pt" style:font-size-complex="14pt"/>
    </style:style>
    <style:style style:name="P37" style:family="paragraph" style:parent-style-name="Standard" style:list-style-name="L5">
      <style:paragraph-properties fo:text-align="start" style:justify-single-word="false"/>
      <style:text-properties style:font-name="Times New Roman" fo:font-size="14pt" officeooo:rsid="0000c682" officeooo:paragraph-rsid="0011bc25" style:font-size-asian="14pt" style:font-size-complex="14pt"/>
    </style:style>
    <style:style style:name="P38" style:family="paragraph" style:parent-style-name="Standard" style:list-style-name="L8">
      <style:paragraph-properties fo:text-align="start" style:justify-single-word="false"/>
      <style:text-properties style:font-name="Times New Roman" fo:font-size="14pt" officeooo:rsid="0000c682" officeooo:paragraph-rsid="0008b44e" style:font-size-asian="14pt" style:font-size-complex="14pt"/>
    </style:style>
    <style:style style:name="P39" style:family="paragraph" style:parent-style-name="Standard" style:list-style-name="L9">
      <style:paragraph-properties fo:text-align="start" style:justify-single-word="false"/>
      <style:text-properties style:font-name="Times New Roman" fo:font-size="14pt" officeooo:rsid="0000c682" officeooo:paragraph-rsid="0000c682" style:font-size-asian="14pt" style:font-size-complex="14pt"/>
    </style:style>
    <style:style style:name="P40" style:family="paragraph" style:parent-style-name="Standard" style:list-style-name="L10">
      <style:paragraph-properties fo:text-align="start" style:justify-single-word="false"/>
      <style:text-properties style:font-name="Times New Roman" fo:font-size="14pt" officeooo:rsid="0000c682" officeooo:paragraph-rsid="0000c682" style:font-size-asian="14pt" style:font-size-complex="14pt"/>
    </style:style>
    <style:style style:name="P41" style:family="paragraph" style:parent-style-name="Standard" style:list-style-name="L11">
      <style:paragraph-properties fo:text-align="start" style:justify-single-word="false"/>
      <style:text-properties style:font-name="Times New Roman" fo:font-size="14pt" officeooo:rsid="0000c682" officeooo:paragraph-rsid="0000c682" style:font-size-asian="14pt" style:font-size-complex="14pt"/>
    </style:style>
    <style:style style:name="P42" style:family="paragraph" style:parent-style-name="Standard" style:list-style-name="L12">
      <style:paragraph-properties fo:text-align="start" style:justify-single-word="false"/>
      <style:text-properties style:font-name="Times New Roman" fo:font-size="14pt" officeooo:rsid="0000c682" officeooo:paragraph-rsid="00020134" style:font-size-asian="14pt" style:font-size-complex="14pt"/>
    </style:style>
    <style:style style:name="P43" style:family="paragraph" style:parent-style-name="Standard" style:list-style-name="L4">
      <style:paragraph-properties fo:text-align="start" style:justify-single-word="false"/>
      <style:text-properties style:font-name="Times New Roman" fo:font-size="14pt" officeooo:rsid="000205d1" officeooo:paragraph-rsid="00276546" style:font-size-asian="14pt" style:font-size-complex="14pt"/>
    </style:style>
    <style:style style:name="P44" style:family="paragraph" style:parent-style-name="Standard" style:list-style-name="L6">
      <style:paragraph-properties fo:text-align="start" style:justify-single-word="false"/>
      <style:text-properties style:font-name="Times New Roman" fo:font-size="14pt" officeooo:rsid="000205d1" officeooo:paragraph-rsid="0020bece" style:font-size-asian="14pt" style:font-size-complex="14pt"/>
    </style:style>
    <style:style style:name="P45" style:family="paragraph" style:parent-style-name="Standard" style:list-style-name="L8">
      <style:paragraph-properties fo:text-align="start" style:justify-single-word="false"/>
      <style:text-properties style:font-name="Times New Roman" fo:font-size="14pt" officeooo:rsid="000205d1" officeooo:paragraph-rsid="00165276" style:font-size-asian="14pt" style:font-size-complex="14pt"/>
    </style:style>
    <style:style style:name="P46" style:family="paragraph" style:parent-style-name="Standard" style:list-style-name="L8">
      <style:paragraph-properties fo:text-align="start" style:justify-single-word="false"/>
      <style:text-properties style:font-name="Times New Roman" fo:font-size="14pt" officeooo:rsid="000205d1" officeooo:paragraph-rsid="0008b44e" style:font-size-asian="14pt" style:font-size-complex="14pt"/>
    </style:style>
    <style:style style:name="P47" style:family="paragraph" style:parent-style-name="Standard" style:list-style-name="L5">
      <style:paragraph-properties fo:text-align="start" style:justify-single-word="false"/>
      <style:text-properties style:font-name="Times New Roman" fo:font-size="14pt" officeooo:rsid="0020bece" officeooo:paragraph-rsid="0020bece" style:font-size-asian="14pt" style:font-size-complex="14pt"/>
    </style:style>
    <style:style style:name="P48" style:family="paragraph" style:parent-style-name="Standard" style:list-style-name="L5">
      <style:paragraph-properties fo:text-align="start" style:justify-single-word="false"/>
      <style:text-properties style:font-name="Times New Roman" fo:font-size="14pt" officeooo:rsid="0020bece" officeooo:paragraph-rsid="0020f59d" style:font-size-asian="14pt" style:font-size-complex="14pt"/>
    </style:style>
    <style:style style:name="P49" style:family="paragraph" style:parent-style-name="Standard" style:list-style-name="L5">
      <style:paragraph-properties fo:text-align="start" style:justify-single-word="false"/>
      <style:text-properties style:font-name="Times New Roman" fo:font-size="14pt" officeooo:rsid="0020f59d" officeooo:paragraph-rsid="00213f09" style:font-size-asian="14pt" style:font-size-complex="14pt"/>
    </style:style>
    <style:style style:name="P50" style:family="paragraph" style:parent-style-name="Standard" style:list-style-name="L5">
      <style:paragraph-properties fo:text-align="start" style:justify-single-word="false"/>
      <style:text-properties style:font-name="Times New Roman" fo:font-size="14pt" officeooo:rsid="00213f09" officeooo:paragraph-rsid="00213f09" style:font-size-asian="14pt" style:font-size-complex="14pt"/>
    </style:style>
    <style:style style:name="P51" style:family="paragraph" style:parent-style-name="Standard" style:list-style-name="L5">
      <style:paragraph-properties fo:text-align="start" style:justify-single-word="false"/>
      <style:text-properties style:font-name="Times New Roman" fo:font-size="14pt" officeooo:rsid="0019def6" officeooo:paragraph-rsid="00213f09" style:font-size-asian="14pt" style:font-size-complex="14pt"/>
    </style:style>
    <style:style style:name="P52" style:family="paragraph" style:parent-style-name="Standard" style:list-style-name="L5">
      <style:paragraph-properties fo:text-align="start" style:justify-single-word="false"/>
      <style:text-properties style:font-name="Times New Roman" fo:font-size="14pt" officeooo:rsid="0019def6" officeooo:paragraph-rsid="001aa9c5" style:font-size-asian="14pt" style:font-size-complex="14pt"/>
    </style:style>
    <style:style style:name="P53" style:family="paragraph" style:parent-style-name="Standard" style:list-style-name="L5">
      <style:paragraph-properties fo:text-align="start" style:justify-single-word="false"/>
      <style:text-properties style:font-name="Times New Roman" fo:font-size="14pt" officeooo:rsid="0019def6" officeooo:paragraph-rsid="001fdc34" style:font-size-asian="14pt" style:font-size-complex="14pt"/>
    </style:style>
    <style:style style:name="P54" style:family="paragraph" style:parent-style-name="Standard" style:list-style-name="L8">
      <style:paragraph-properties fo:text-align="start" style:justify-single-word="false"/>
      <style:text-properties style:font-name="Times New Roman" fo:font-size="14pt" officeooo:rsid="0019def6" officeooo:paragraph-rsid="0019def6" style:font-size-asian="14pt" style:font-size-complex="14pt"/>
    </style:style>
    <style:style style:name="P55" style:family="paragraph" style:parent-style-name="Standard" style:list-style-name="L3">
      <style:paragraph-properties fo:text-align="start" style:justify-single-word="false"/>
      <style:text-properties style:font-name="Times New Roman" fo:font-size="14pt" officeooo:rsid="0024a7e0" officeooo:paragraph-rsid="0024a7e0" style:font-size-asian="14pt" style:font-size-complex="14pt"/>
    </style:style>
    <style:style style:name="P56" style:family="paragraph" style:parent-style-name="Standard" style:list-style-name="L5">
      <style:paragraph-properties fo:text-align="start" style:justify-single-word="false"/>
      <style:text-properties style:font-name="Times New Roman" fo:font-size="14pt" officeooo:rsid="001aa9c5" officeooo:paragraph-rsid="001b5e05" style:font-size-asian="14pt" style:font-size-complex="14pt"/>
    </style:style>
    <style:style style:name="P57" style:family="paragraph" style:parent-style-name="Standard" style:list-style-name="L5">
      <style:paragraph-properties fo:text-align="start" style:justify-single-word="false"/>
      <style:text-properties style:font-name="Times New Roman" fo:font-size="14pt" officeooo:rsid="001b5e05" officeooo:paragraph-rsid="001cdfb2" style:font-size-asian="14pt" style:font-size-complex="14pt"/>
    </style:style>
    <style:style style:name="P58" style:family="paragraph" style:parent-style-name="Standard" style:list-style-name="L5">
      <style:paragraph-properties fo:text-align="start" style:justify-single-word="false"/>
      <style:text-properties style:font-name="Times New Roman" fo:font-size="14pt" officeooo:rsid="001cdfb2" officeooo:paragraph-rsid="001e5dcd" style:font-size-asian="14pt" style:font-size-complex="14pt"/>
    </style:style>
    <style:style style:name="P59" style:family="paragraph" style:parent-style-name="Standard" style:list-style-name="L5">
      <style:paragraph-properties fo:text-align="start" style:justify-single-word="false"/>
      <style:text-properties style:font-name="Times New Roman" fo:font-size="14pt" officeooo:rsid="001e5dcd" officeooo:paragraph-rsid="001ec79d" style:font-size-asian="14pt" style:font-size-complex="14pt"/>
    </style:style>
    <style:style style:name="P60" style:family="paragraph" style:parent-style-name="Standard" style:list-style-name="L5">
      <style:paragraph-properties fo:text-align="start" style:justify-single-word="false"/>
      <style:text-properties style:font-name="Times New Roman" fo:font-size="14pt" officeooo:rsid="001ec79d" officeooo:paragraph-rsid="001fdc34" style:font-size-asian="14pt" style:font-size-complex="14pt"/>
    </style:style>
    <style:style style:name="P61" style:family="paragraph" style:parent-style-name="Standard" style:list-style-name="L8">
      <style:paragraph-properties fo:text-align="start" style:justify-single-word="false"/>
      <style:text-properties style:font-name="Times New Roman" fo:font-size="14pt" officeooo:rsid="00165276" officeooo:paragraph-rsid="00165276" style:font-size-asian="14pt" style:font-size-complex="14pt"/>
    </style:style>
    <style:style style:name="P62" style:family="paragraph" style:parent-style-name="Standard" style:list-style-name="L8">
      <style:paragraph-properties fo:text-align="start" style:justify-single-word="false"/>
      <style:text-properties style:font-name="Times New Roman" fo:font-size="14pt" officeooo:rsid="002054d4" officeooo:paragraph-rsid="002054d4" style:font-size-asian="14pt" style:font-size-complex="14pt"/>
    </style:style>
    <style:style style:name="P63" style:family="paragraph" style:parent-style-name="Standard" style:list-style-name="L8">
      <style:paragraph-properties fo:text-align="start" style:justify-single-word="false"/>
      <style:text-properties style:font-name="Times New Roman" fo:font-size="14pt" officeooo:rsid="00023995" officeooo:paragraph-rsid="0008b44e" style:font-size-asian="14pt" style:font-size-complex="14pt"/>
    </style:style>
    <style:style style:name="P64" style:family="paragraph" style:parent-style-name="Standard" style:list-style-name="L8">
      <style:paragraph-properties fo:text-align="start" style:justify-single-word="false"/>
      <style:text-properties style:font-name="Times New Roman" fo:font-size="14pt" officeooo:rsid="0004dd5b" officeooo:paragraph-rsid="0008b44e" style:font-size-asian="14pt" style:font-size-complex="14pt"/>
    </style:style>
    <style:style style:name="P65" style:family="paragraph" style:parent-style-name="Standard" style:list-style-name="L8">
      <style:paragraph-properties fo:text-align="start" style:justify-single-word="false"/>
      <style:text-properties style:font-name="Times New Roman" fo:font-size="14pt" officeooo:rsid="0005a27d" officeooo:paragraph-rsid="0008b44e" style:font-size-asian="14pt" style:font-size-complex="14pt"/>
    </style:style>
    <style:style style:name="P66" style:family="paragraph" style:parent-style-name="Standard" style:list-style-name="L8">
      <style:paragraph-properties fo:text-align="start" style:justify-single-word="false"/>
      <style:text-properties style:font-name="Times New Roman" fo:font-size="14pt" officeooo:rsid="0007758e" officeooo:paragraph-rsid="000a5287" style:font-size-asian="14pt" style:font-size-complex="14pt"/>
    </style:style>
    <style:style style:name="P67" style:family="paragraph" style:parent-style-name="Standard" style:list-style-name="L8">
      <style:paragraph-properties fo:text-align="start" style:justify-single-word="false"/>
      <style:text-properties style:font-name="Times New Roman" fo:font-size="14pt" officeooo:rsid="000a5287" officeooo:paragraph-rsid="000c7d8c" style:font-size-asian="14pt" style:font-size-complex="14pt"/>
    </style:style>
    <style:style style:name="P68" style:family="paragraph" style:parent-style-name="Standard" style:list-style-name="L8">
      <style:paragraph-properties fo:text-align="start" style:justify-single-word="false"/>
      <style:text-properties style:font-name="Times New Roman" fo:font-size="14pt" officeooo:rsid="000c7d8c" officeooo:paragraph-rsid="0010358f" style:font-size-asian="14pt" style:font-size-complex="14pt"/>
    </style:style>
    <style:style style:name="P69" style:family="paragraph" style:parent-style-name="Standard" style:list-style-name="L8">
      <style:paragraph-properties fo:text-align="start" style:justify-single-word="false"/>
      <style:text-properties style:font-name="Times New Roman" fo:font-size="14pt" officeooo:rsid="0010358f" officeooo:paragraph-rsid="0011c047" style:font-size-asian="14pt" style:font-size-complex="14pt"/>
    </style:style>
    <style:style style:name="P70" style:family="paragraph" style:parent-style-name="Standard" style:list-style-name="L8">
      <style:paragraph-properties fo:text-align="start" style:justify-single-word="false"/>
      <style:text-properties style:font-name="Times New Roman" fo:font-size="14pt" officeooo:rsid="0011c047" officeooo:paragraph-rsid="0011ca77" style:font-size-asian="14pt" style:font-size-complex="14pt"/>
    </style:style>
    <style:style style:name="P71" style:family="paragraph" style:parent-style-name="Standard" style:list-style-name="L8">
      <style:paragraph-properties fo:text-align="start" style:justify-single-word="false"/>
      <style:text-properties style:font-name="Times New Roman" fo:font-size="14pt" officeooo:rsid="0011ca77" officeooo:paragraph-rsid="0012f84d" style:font-size-asian="14pt" style:font-size-complex="14pt"/>
    </style:style>
    <style:style style:name="P72" style:family="paragraph" style:parent-style-name="Standard" style:list-style-name="L8">
      <style:paragraph-properties fo:text-align="start" style:justify-single-word="false"/>
      <style:text-properties style:font-name="Times New Roman" fo:font-size="14pt" officeooo:rsid="0001ca26" officeooo:paragraph-rsid="0012f84d" style:font-size-asian="14pt" style:font-size-complex="14pt"/>
    </style:style>
    <style:style style:name="P73" style:family="paragraph" style:parent-style-name="Standard" style:list-style-name="L8">
      <style:paragraph-properties fo:text-align="start" style:justify-single-word="false"/>
      <style:text-properties style:font-name="Times New Roman" fo:font-size="14pt" officeooo:rsid="00020134" officeooo:paragraph-rsid="0008b44e" style:font-size-asian="14pt" style:font-size-complex="14pt"/>
    </style:style>
    <style:style style:name="P74" style:family="paragraph" style:parent-style-name="Standard" style:list-style-name="L8">
      <style:paragraph-properties fo:text-align="start" style:justify-single-word="false"/>
      <style:text-properties style:font-name="Times New Roman" fo:font-size="14pt" officeooo:rsid="00099c5d" officeooo:paragraph-rsid="00099c5d" style:font-size-asian="14pt" style:font-size-complex="14pt"/>
    </style:style>
    <style:style style:name="P75" style:family="paragraph" style:parent-style-name="Standard" style:list-style-name="L9">
      <style:paragraph-properties fo:text-align="start" style:justify-single-word="false"/>
      <style:text-properties fo:color="#ce181e" style:font-name="Times New Roman" fo:font-size="14pt" fo:font-style="italic" style:text-underline-style="solid" style:text-underline-width="auto" style:text-underline-color="font-color" fo:font-weight="bold" officeooo:rsid="0001ca26" officeooo:paragraph-rsid="0001ca26" style:font-size-asian="14pt" style:font-style-asian="italic" style:font-weight-asian="bold" style:font-size-complex="14pt" style:font-style-complex="italic" style:font-weight-complex="bold"/>
    </style:style>
    <style:style style:name="P76" style:family="paragraph" style:parent-style-name="Standard">
      <style:paragraph-properties fo:text-align="start" style:justify-single-word="false"/>
      <style:text-properties officeooo:rsid="002c6472" officeooo:paragraph-rsid="002c6472"/>
    </style:style>
    <style:style style:name="P77" style:family="paragraph" style:parent-style-name="Standard" style:list-style-name="L1">
      <style:paragraph-properties fo:text-align="start" style:justify-single-word="false" fo:break-before="page"/>
      <style:text-properties officeooo:paragraph-rsid="0010bf02"/>
    </style:style>
    <style:style style:name="T1" style:family="text">
      <style:text-properties officeooo:rsid="000158c1"/>
    </style:style>
    <style:style style:name="T2" style:family="text">
      <style:text-properties officeooo:rsid="0001d8ea"/>
    </style:style>
    <style:style style:name="T3" style:family="text">
      <style:text-properties fo:font-size="14pt" officeooo:rsid="00020134" style:font-size-asian="14pt" style:font-size-complex="14pt"/>
    </style:style>
    <style:style style:name="T4" style:family="text">
      <style:text-properties fo:font-size="14pt" officeooo:rsid="0000c682" style:font-size-asian="14pt" style:font-size-complex="14pt"/>
    </style:style>
    <style:style style:name="T5" style:family="text">
      <style:text-properties fo:font-size="14pt" officeooo:rsid="000c7d8c" style:font-size-asian="14pt" style:font-size-complex="14pt"/>
    </style:style>
    <style:style style:name="T6" style:family="text">
      <style:text-properties fo:font-size="14pt" officeooo:rsid="00165276" style:font-size-asian="14pt" style:font-size-complex="14pt"/>
    </style:style>
    <style:style style:name="T7" style:family="text">
      <style:text-properties fo:font-size="14pt" officeooo:rsid="0020bece" style:font-size-asian="14pt" style:font-size-complex="14pt"/>
    </style:style>
    <style:style style:name="T8" style:family="text">
      <style:text-properties officeooo:rsid="000b0eee"/>
    </style:style>
    <style:style style:name="T9" style:family="text">
      <style:text-properties officeooo:rsid="000c7d8c"/>
    </style:style>
    <style:style style:name="T10" style:family="text">
      <style:text-properties officeooo:rsid="000f9db5"/>
    </style:style>
    <style:style style:name="T11" style:family="text">
      <style:text-properties style:font-name="Times New Roman" fo:font-size="14pt" fo:font-weight="bold" officeooo:rsid="0010358f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font-weight="bold" officeooo:rsid="0010bf02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4pt" fo:font-weight="bold" officeooo:rsid="000c7d8c" style:font-size-asian="14pt" style:font-weight-asian="bold" style:font-size-complex="14pt" style:font-weight-complex="bold"/>
    </style:style>
    <style:style style:name="T14" style:family="text">
      <style:text-properties style:font-name="Times New Roman" fo:font-size="14pt" fo:font-weight="bold" officeooo:rsid="002260bb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style:font-name="Times New Roman" fo:font-size="14pt" officeooo:rsid="000c7d8c" style:font-size-asian="14pt" style:font-size-complex="14pt"/>
    </style:style>
    <style:style style:name="T17" style:family="text">
      <style:text-properties style:font-name="Times New Roman" fo:font-size="14pt" officeooo:rsid="00299342" style:font-size-asian="14pt" style:font-size-complex="14pt"/>
    </style:style>
    <style:style style:name="T18" style:family="text">
      <style:text-properties style:font-name="Times New Roman" fo:font-size="14pt" officeooo:rsid="002bc6e0" style:font-size-asian="14pt" style:font-size-complex="14pt"/>
    </style:style>
    <style:style style:name="T19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24b39a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2bc6e0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299342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2c6472" style:font-size-asian="14pt" style:font-weight-asian="normal" style:font-size-complex="14pt" style:font-weight-complex="normal"/>
    </style:style>
    <style:style style:name="T24" style:family="text">
      <style:text-properties officeooo:rsid="0012f84d"/>
    </style:style>
    <style:style style:name="T25" style:family="text">
      <style:text-properties officeooo:rsid="0019def6"/>
    </style:style>
    <style:style style:name="T26" style:family="text">
      <style:text-properties officeooo:rsid="001aa9c5"/>
    </style:style>
    <style:style style:name="T27" style:family="text">
      <style:text-properties officeooo:rsid="001fdc34"/>
    </style:style>
    <style:style style:name="T28" style:family="text">
      <style:text-properties officeooo:rsid="0020f59d"/>
    </style:style>
    <style:style style:name="T29" style:family="text">
      <style:text-properties officeooo:rsid="00213f09"/>
    </style:style>
    <style:style style:name="T30" style:family="text">
      <style:text-properties officeooo:rsid="0027e327"/>
    </style:style>
    <style:style style:name="T31" style:family="text">
      <style:text-properties fo:color="#ce18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2" style:family="text">
      <style:text-properties fo:color="#ce181e" fo:font-style="italic" style:text-underline-style="solid" style:text-underline-width="auto" style:text-underline-color="font-color" fo:font-weight="bold" officeooo:rsid="002bc6e0" style:font-style-asian="italic" style:font-weight-asian="bold" style:font-style-complex="italic" style:font-weight-complex="bold"/>
    </style:style>
    <style:style style:name="T33" style:family="text">
      <style:text-properties officeooo:rsid="0028252c"/>
    </style:style>
    <style:style style:name="T34" style:family="text">
      <style:text-properties officeooo:rsid="0029934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3">N</text:span><text:span text:style-name="T11">OTES: </text:span></text:p>
      <text:p text:style-name="P19"><text:span text:style-name="T11">T</text:span><text:span text:style-name="T12">he change log updates are in descending order (newest first). <text:s/>Review all change log date entries before proceeding with the newest update </text:span><text:span text:style-name="T14">to ensure critical updates have not been missed</text:span><text:span text:style-name="T12">.<text:line-break/><text:line-break/></text:span><text:span text:style-name="T23">02/20</text:span><text:span text:style-name="T20">/2018 </text:span><text:span text:style-name="T22">(Version 119.0</text:span><text:span text:style-name="T23">20</text:span><text:span text:style-name="T22">)</text:span></text:p>
      <text:p text:style-name="P76"><text:span text:style-name="T22">C</text:span><text:span text:style-name="T19">hanges:</text:span></text:p>
      <text:list xml:id="list2449649612" text:style-name="L1">
        <text:list-header>
          <text:p text:style-name="P77"><text:span text:style-name="T12"/></text:p>
        </text:list-header>
      </text:list>
      <text:p text:style-name="P11"><text:span text:style-name="T18">12/04</text:span><text:span text:style-name="T15">/2018 </text:span><text:span text:style-name="T17">(Version 119.013)</text:span></text:p>
      <text:p text:style-name="P8">Changes:</text:p>
      <text:list xml:id="list2319899960" text:style-name="L2">
        <text:list-item>
          <text:p text:style-name="P20">This is release is major update to MSCC-Core. <text:s/>Please review the MSCC-Core Operators guide for new and updated features.</text:p>
        </text:list-item>
        <text:list-item>
          <text:p text:style-name="P20">MSCC-Core is now completely self configuring. <text:s/><text:span text:style-name="T30">With new installations (the transceiver have never been attached to the PC, MSCC-Core will present a window at start up asking for the PCB version of the transceiver. <text:s/>Default values are set for all parameters including power output,frequency calibration and transmit I/Q balance.</text:span></text:p>
        </text:list-item>
        <text:list-item>
          <text:p text:style-name="P21">The firmware of the transceiver <text:span text:style-name="T31">MUST BE UPDATED</text:span> to the version included with the release package. <text:s/>This does not apply to transceivers purchased after the date of this release. <text:s/><text:span text:style-name="T32">Do this first before starting MSCC-Core.</text:span></text:p>
        </text:list-item>
        <text:list-item>
          <text:p text:style-name="P22">An output power calibration may be required after installing this release. The output power management routines have been re-written. Upon the first start this version of MSCC-Core, the transceiver will be updated with default output power values. <text:s/>The default values should be sufficient for the transceiver but they may not be optimal. Check the power output using the MSCC-Core Power-Cal tab.</text:p>
          <text:p text:style-name="P20"/>
        </text:list-item>
      </text:list>
      <text:p text:style-name="P7">Known Issues:</text:p>
      <text:list xml:id="list1818435655" text:style-name="L3">
        <text:list-item>
          <text:p text:style-name="P26">When pressing the tune button, OVER DRIVEN may be <text:span text:style-name="T34">momentarily </text:span>displayed. <text:s/>The transceiver is not being over driven. This will be address<text:span text:style-name="T33">ed</text:span> in a subsequent release.</text:p>
        </text:list-item>
        <text:list-item>
          <text:p text:style-name="P28">When clicking and rotating through the operating modes, OVER DRIVEN may be momentarily displayed.. <text:s/>This will be addressed in a subsequent release.</text:p>
          <text:p text:style-name="P29"/>
        </text:list-item>
      </text:list>
      <text:p text:style-name="P7">Defects Corrected:</text:p>
      <text:list xml:id="list3985185723" text:style-name="L4">
        <text:list-item>
          <text:p text:style-name="P27">The frequency calibration routine(s) were not always setting the PPM value correctly. <text:s/>This has been fixed.</text:p>
          <text:p text:style-name="P33"/>
        </text:list-item>
      </text:list>
      <text:p text:style-name="P15"/>
      <text:p text:style-name="P7">Updated Versions:</text:p>
      <text:list xml:id="list95857290785557" text:continue-numbering="true" text:style-name="L4">
        <text:list-item>
          <text:p text:style-name="P43">Release Package: <text:span text:style-name="T8">119.013</text:span></text:p>
        </text:list-item>
        <text:list-item>
          <text:p text:style-name="P43">MSCC: <text:span text:style-name="T8">119.013</text:span></text:p>
        </text:list-item>
        <text:list-item>
          <text:p text:style-name="P43">MS-sdr: <text:span text:style-name="T9">Updated</text:span></text:p>
        </text:list-item>
        <text:list-item>
          <text:p text:style-name="P43">SDRcore-trans: <text:span text:style-name="T9">Updated</text:span></text:p>
        </text:list-item>
        <text:list-item>
          <text:p text:style-name="P23">SDRcore-recv: Updated</text:p>
        </text:list-item>
      </text:list>
      <text:p text:style-name="P17"><text:span text:style-name="T7">10</text:span><text:span text:style-name="T3">/</text:span><text:span text:style-name="T5">01</text:span><text:span text:style-name="T4">/2018</text:span></text:p>
      <text:p text:style-name="P6">Changes:</text:p>
      <text:list xml:id="list3546790429" text:style-name="L5">
        <text:list-item>
          <text:p text:style-name="P47">Support for the Hardrock 50 has been added.</text:p>
        </text:list-item>
        <text:list-item>
          <text:p text:style-name="P48">Manually uninstalling the previous version of MSCC-Core is no longer required.</text:p>
        </text:list-item>
        <text:list-item>
          <text:p text:style-name="P49">The panadapter has been completely revised.</text:p>
        </text:list-item>
        <text:list-item>
          <text:p text:style-name="P50">CW Pitch control has been added.</text:p>
        </text:list-item>
        <text:list-item>
          <text:p text:style-name="P51"><text:span text:style-name="T29">Windows 7 is now supported.</text:span><text:line-break/></text:p>
        </text:list-item>
      </text:list>
      <text:p text:style-name="P6">Known Issues:</text:p>
      <text:list xml:id="list95855910466355" text:continue-list="list1818435655" text:style-name="L3">
        <text:list-item>
          <text:p text:style-name="P34">The transceiver will occasionally not go into CW mode. The work around is to cycle through the modes and back to CW mode. This normally corrects the issue.</text:p>
        </text:list-item>
        <text:list-item>
          <text:p text:style-name="P30">When changing the mode to AM or clicking through AM, the OVER DRIVE indicator may flash on for a few moments. </text:p>
        </text:list-item>
        <text:list-item>
          <text:p text:style-name="P55">Occasionally MSCC-Core hangs for a few moments before closing. <text:s/>This causes ms-sdr to report “I’m alive” message failure. Click OK on the pop up and all processes will stop. </text:p>
          <text:p text:style-name="P30"/>
        </text:list-item>
      </text:list>
      <text:p text:style-name="P6">Defects Corrected:</text:p>
      <text:list xml:id="list2885241741" text:style-name="L6">
        <text:list-item>
          <text:p text:style-name="P35"><text:span text:style-name="T28">If </text:span>current mode <text:span text:style-name="T28">is</text:span> CW and MSCC-Core is restarted, the internal frequency of the transceiver is not set correctly. <text:s/><text:span text:style-name="T28">This defect has been fixed.</text:span></text:p>
        </text:list-item>
        <text:list-item>
          <text:p text:style-name="P35"/>
        </text:list-item>
      </text:list>
      <text:p text:style-name="P6">Updated Versions:</text:p>
      <text:list xml:id="list95856745812898" text:continue-numbering="true" text:style-name="L6">
        <text:list-item>
          <text:p text:style-name="P44">Release Package: <text:span text:style-name="T8">118.100</text:span></text:p>
        </text:list-item>
        <text:list-item>
          <text:p text:style-name="P44">MSCC: <text:span text:style-name="T8">118.100</text:span></text:p>
        </text:list-item>
        <text:list-item>
          <text:p text:style-name="P44">MS-sdr: <text:span text:style-name="T9">Updated</text:span></text:p>
        </text:list-item>
        <text:list-item>
          <text:p text:style-name="P44">SDRcore-trans: <text:span text:style-name="T9">Updated</text:span></text:p>
        </text:list-item>
        <text:list-item>
          <text:p text:style-name="P24"><text:span text:style-name="T16">SDRcore-recv: </text:span><text:span text:style-name="T9">Updated</text:span></text:p>
        </text:list-item>
      </text:list>
      <text:p text:style-name="P18"/>
      <text:p text:style-name="P9"><text:span text:style-name="T5">0</text:span><text:span text:style-name="T6">9</text:span><text:span text:style-name="T3">/</text:span><text:span text:style-name="T5">01</text:span><text:span text:style-name="T4">/2018</text:span></text:p>
      <text:p text:style-name="P5">Changes:</text:p>
      <text:list xml:id="list95856232381503" text:continue-list="list3546790429" text:style-name="L5">
        <text:list-item>
          <text:p text:style-name="P52">There is now a BACKUP button on the Misc tab. <text:s/>Clicking this button causes MSCC-Core to create a backup of all the <text:span text:style-name="T26">initialization</text:span> and log files.</text:p>
        </text:list-item>
        <text:list-item>
          <text:p text:style-name="P56">There is now a ZIP LOG FILES button on the Misc tab. <text:s/>Clicking the button will create a zip file of all the initialization and log files. <text:s/>The zip file is named “ziplog.zip” and is located in the release-package directory.</text:p>
        </text:list-item>
        <text:list-item>
          <text:p text:style-name="P57">A noise blanker has been implemented. <text:s/>Please refer to the MSCC-Core Users Guide for more information.</text:p>
        </text:list-item>
        <text:list-item>
          <text:p text:style-name="P58">Comm port activation of PTT is now supported.</text:p>
        </text:list-item>
        <text:list-item>
          <text:p text:style-name="P59">A name is no longer required when creating a new favorite.</text:p>
        </text:list-item>
        <text:list-item>
          <text:p text:style-name="P60">The Panadapter now has spectrum averaging. </text:p>
        </text:list-item>
        <text:list-item>
          <text:p text:style-name="P53"><text:span text:style-name="T27">Added 30MHz to the Frequency Calibration selection list.</text:span><text:line-break/></text:p>
        </text:list-item>
      </text:list>
      <text:p text:style-name="P5">Known Issues:</text:p>
      <text:list xml:id="list634613190" text:style-name="L7">
        <text:list-item>
          <text:p text:style-name="P36">The transceiver will occasionally not go into CW mode. The work around is to cycle through the modes and back to CW mode. This normally corrects the issue.</text:p>
        </text:list-item>
        <text:list-item>
          <text:p text:style-name="P36">If the current mode is CW and MSCC-Core is restarted, the internal frequency of the transceiver is not set correctly. <text:s/>The work around is to cycle through the modes and back to CW. <text:s/>This corrects the issue.</text:p>
        </text:list-item>
        <text:list-item>
          <text:p text:style-name="P31">When changing the mode to AM or clicking through AM, the OVER DRIVE indicator may flash on for a few moments. </text:p>
          <text:p text:style-name="P31"/>
        </text:list-item>
      </text:list>
      <text:p text:style-name="P5">Defects Corrected:</text:p>
      <text:list xml:id="list3953502726" text:style-name="L8">
        <text:list-item>
          <text:p text:style-name="P61">When leaving the I/Q calibration page, MSCC-<text:span text:style-name="T25">Core</text:span> was incorrectly issuing a warning pop. <text:s/>This has been corrected.</text:p>
        </text:list-item>
        <text:list-item>
          <text:p text:style-name="P54">MSCC-Core now detects when the Multus_mscc.ini is missing and correctly presents an error message and terminates.</text:p>
        </text:list-item>
        <text:list-item>
          <text:p text:style-name="P54">MSCC-Core now detects if the subsystem has started properly. If not, it presents an error message and terminates.</text:p>
        </text:list-item>
        <text:list-item>
          <text:p text:style-name="P54">MS-sdr was erroneously reporting compression messages to the log. This has been corrected.</text:p>
        </text:list-item>
        <text:list-item>
          <text:p text:style-name="P62">Corrected issue on Win 7 systems. <text:s/>Com port write operations would fail. This has been fixed.</text:p>
        </text:list-item>
      </text:list>
      <text:p text:style-name="P5"/>
      <text:p text:style-name="P14"/>
      <text:p text:style-name="P5">Updated Versions:</text:p>
      <text:list xml:id="list95856123810168" text:continue-numbering="true" text:style-name="L8">
        <text:list-item>
          <text:p text:style-name="P45">Release Package: <text:span text:style-name="T8">118.090</text:span></text:p>
        </text:list-item>
        <text:list-item>
          <text:p text:style-name="P45">MSCC: <text:span text:style-name="T8">118.090</text:span></text:p>
        </text:list-item>
        <text:list-item>
          <text:p text:style-name="P45">MS-sdr: <text:span text:style-name="T9">Updated</text:span></text:p>
        </text:list-item>
        <text:list-item>
          <text:p text:style-name="P45">SDRcore-trans: <text:span text:style-name="T9">Updated</text:span></text:p>
        </text:list-item>
        <text:list-item>
          <text:p text:style-name="P25">SDRcore-recv: <text:span text:style-name="T9">Updated</text:span></text:p>
        </text:list-item>
      </text:list>
      <text:p text:style-name="P16"><text:span text:style-name="T5">08</text:span><text:span text:style-name="T3">/</text:span><text:span text:style-name="T5">01</text:span><text:span text:style-name="T4">/2018</text:span></text:p>
      <text:p text:style-name="P4">Changes:</text:p>
      <text:list xml:id="list95857029906815" text:continue-list="list95856232381503" text:style-name="L5">
        <text:list-item>
          <text:p text:style-name="P37">This release requires the removal of all <text:span text:style-name="T1">initialization</text:span> files. <text:span text:style-name="T2">Navigate to the release package directory and click (or double click) on ini-delete. This program will delete all initialization files. <text:s/>Run MSCC-Initialize after deleting the initialization files.</text:span></text:p>
        </text:list-item>
      </text:list>
      <text:list xml:id="list95857237369105" text:continue-list="list95856123810168" text:style-name="L8">
        <text:list-item>
          <text:p text:style-name="P63">The panadapter now displays the current operating mode.</text:p>
        </text:list-item>
        <text:list-item>
          <text:p text:style-name="P64">MSCC-Core now remembers the current screen position for the main display, s-meter display and panadapter display.</text:p>
        </text:list-item>
        <text:list-item>
          <text:p text:style-name="P65">The S-meter now switches to VU in transmit mode.</text:p>
        </text:list-item>
        <text:list-item>
          <text:p text:style-name="P66">Frequency calibration now displays a progress bar when in calibration mode.</text:p>
        </text:list-item>
        <text:list-item>
          <text:p text:style-name="P67">The standard carrier frequency is now a list box.</text:p>
        </text:list-item>
        <text:list-item>
          <text:p text:style-name="P68">The Favs tab has been completely revised. <text:s/>See the MSCC-Core Operators Guide for more information.</text:p>
        </text:list-item>
        <text:list-item>
          <text:p text:style-name="P69">The name of the installation file is now mscc-install.exe</text:p>
        </text:list-item>
        <text:list-item>
          <text:p text:style-name="P70">MSCC-Core now displays the version of all cooperating programs.</text:p>
        </text:list-item>
        <text:list-item>
          <text:p text:style-name="P71">Changing the main frequency may now be accomplished by hover the mouse pointer to a position just above or below the frequency digit and clicking the mouse.</text:p>
        </text:list-item>
        <text:list-item>
          <text:p text:style-name="P72"><text:span text:style-name="T24">Transmit audio compression is now available. </text:span><text:line-break/></text:p>
        </text:list-item>
      </text:list>
      <text:p text:style-name="P4">Known Issues:</text:p>
      <text:list xml:id="list95856635984885" text:continue-numbering="true" text:style-name="L8">
        <text:list-item>
          <text:p text:style-name="P38">The transceiver will occasionally not go into CW mode. The work around is to cycle through the modes and back to CW mode. This normally corrects the issue.</text:p>
        </text:list-item>
        <text:list-item>
          <text:p text:style-name="P38">If the current mode is CW and MSCC-Core is restarted, the internal frequency of the transceiver is not set correctly. <text:s/>The work around is to cycle through the modes and back to CW. <text:s/>This corrects the issue.</text:p>
        </text:list-item>
        <text:list-item>
          <text:p text:style-name="P32">When changing the mode to AM or clicking through AM, the OVER DRIVE indicator may flash on for a few moments. </text:p>
        </text:list-item>
      </text:list>
      <text:p text:style-name="P4"/>
      <text:p text:style-name="P4">Defects Corrected:</text:p>
      <text:list xml:id="list95856145949739" text:continue-numbering="true" text:style-name="L8">
        <text:list-item>
          <text:p text:style-name="P73">MSCC/MS-SDR: The main frequency display now displays the correct frequency when MS-SDR detects a frequency change set by the comm port.</text:p>
        </text:list-item>
        <text:list-item>
          <text:p text:style-name="P46">MSCC: Panadapter: The panadapter now displays the correct frequencies on the X axis.</text:p>
        </text:list-item>
        <text:list-item>
          <text:p text:style-name="P74">Incorrect UDP ports were assigned when the Multus_mscci.ini file was update<text:span text:style-name="T10">d</text:span> by MSCC-Core.</text:p>
        </text:list-item>
      </text:list>
      <text:p text:style-name="P4"/>
      <text:p text:style-name="P13">Updated Versions:</text:p>
      <text:list xml:id="list95856518186163" text:continue-numbering="true" text:style-name="L8">
        <text:list-item>
          <text:p text:style-name="P46">Release Package: <text:span text:style-name="T8">118.080</text:span></text:p>
        </text:list-item>
        <text:list-item>
          <text:p text:style-name="P46">MSCC: <text:span text:style-name="T8">118.080</text:span></text:p>
        </text:list-item>
        <text:list-item>
          <text:p text:style-name="P46">MS-sdr: <text:span text:style-name="T9">Updated</text:span></text:p>
        </text:list-item>
        <text:list-item>
          <text:p text:style-name="P46">SDRcore-trans: <text:span text:style-name="T9">Updated</text:span></text:p>
        </text:list-item>
        <text:list-item>
          <text:p text:style-name="P46">SDRcore-recv: <text:span text:style-name="T9">Updated</text:span></text:p>
        </text:list-item>
      </text:list>
      <text:p text:style-name="P12">07/13/2018</text:p>
      <text:p text:style-name="P3"><text:tab/></text:p>
      <text:p text:style-name="P3">Changes:</text:p>
      <text:list xml:id="list3710352855" text:style-name="L9">
        <text:list-item>
          <text:p text:style-name="P39">New Release. <text:s/>This is a major refresh update to MSCC-Core and all companion applications. If MSCC-Core has been previously installed, <text:s/>uninstall it using the Windows uninstall facility. <text:s/>This release requires the removal of all <text:span text:style-name="T1">initialization</text:span> files. <text:span text:style-name="T2">Navigate to the release package directory and click (or double click) on ini-delete. This program will delete all initialization files.</text:span></text:p>
        </text:list-item>
        <text:list-item>
          <text:p text:style-name="P75">The transceiver firmware must be upgraded to the version in the release package.</text:p>
        </text:list-item>
      </text:list>
      <text:p text:style-name="P3"/>
      <text:p text:style-name="P3">Known Issues:</text:p>
      <text:list xml:id="list2705548973" text:style-name="L10">
        <text:list-item>
          <text:p text:style-name="P40">The transceiver will occasionally not go into CW mode. The work around is to cycle through the modes and back to CW mode. This normally corrects the issue.</text:p>
        </text:list-item>
        <text:list-item>
          <text:p text:style-name="P40">If the current mode is CW and MSCC-Core is restarted, the internal frequency of the transceiver is not set correctly. <text:s/>The work around is to cycle through the modes and back to CW. <text:s/>This corrects the issue.</text:p>
        </text:list-item>
      </text:list>
      <text:p text:style-name="P3"/>
      <text:p text:style-name="P3">Defects Corrected:</text:p>
      <text:list xml:id="list2652580197" text:style-name="L11">
        <text:list-item>
          <text:p text:style-name="P41">New release. <text:s/>Multiple defects corrected.</text:p>
        </text:list-item>
      </text:list>
      <text:p text:style-name="P3"/>
      <text:p text:style-name="P3">Updated Versions:</text:p>
      <text:list xml:id="list744285079" text:style-name="L12">
        <text:list-item>
          <text:p text:style-name="P42">The version of MSCC-Core and all companion applications has been updated.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officeooo:rsid="000f1a2d" officeooo:paragraph-rsid="000f1a2d" style:font-size-asian="10.5pt" style:font-size-complex="12pt"/>
    </style:style>
    <style:style style:name="MP2" style:family="paragraph" style:parent-style-name="Header">
      <style:paragraph-properties fo:text-align="center" style:justify-single-word="false"/>
      <style:text-properties fo:font-size="18pt" officeooo:rsid="000f1a2d" officeooo:paragraph-rsid="000f1a2d" style:font-size-asian="15.75pt" style:font-size-complex="18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7" text:anchor-type="paragraph" svg:y="-0.698in" svg:width="2.6299in" svg:height="0.7583in" draw:z-index="8"><draw:image xlink:href="Pictures/100000000000082200000258B6935E8FAF8BBBCF.jpg" xlink:type="simple" xlink:show="embed" xlink:actuate="onLoad" loext:mime-type="image/jpeg"/></draw:frame></text:p>
        <text:p text:style-name="MP2">MSCC-Core Change Lo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9-02-20T09:58:55.233000000</dc:date>
    <meta:editing-duration>PT16H53M30S</meta:editing-duration>
    <meta:editing-cycles>52</meta:editing-cycles>
    <meta:document-statistic meta:table-count="0" meta:image-count="1" meta:object-count="0" meta:page-count="9" meta:paragraph-count="110" meta:word-count="1289" meta:character-count="7749" meta:non-whitespace-character-count="6600"/>
  </office:meta>
</office:document-meta>
</file>